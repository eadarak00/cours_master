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sur la Configuration DNS</text:h>
      <text:h text:style-name="Heading_20_2" text:outline-level="2">1. Introduction</text:h>
      <text:p text:style-name="Text_20_body">La configuration d'un service DNS (Domain Name System) permet de traduire des noms de domaine en adresses IP, facilitant ainsi la navigation et la communication entre machines sur un réseau. Ce rapport décrit la configuration d'un serveur DNS primaire et d'un serveur DNS secondaire pour le domaine <text:span text:style-name="Strong_20_Emphasis">m1.uasz.sn</text:span>.</text:p>
      <text:h text:style-name="Heading_20_2" text:outline-level="2">2. Objectifs</text:h>
      <text:list text:style-name="L1">
        <text:list-item>
          <text:p text:style-name="P3">Installer et configurer un serveur DNS primaire. </text:p>
        </text:list-item>
        <text:list-item>
          <text:p text:style-name="P3">Installer et configurer un serveur DNS secondaire. </text:p>
        </text:list-item>
        <text:list-item>
          <text:p text:style-name="P2">Vérifier le bon fonctionnement de la redondance des serveurs DNS. </text:p>
        </text:list-item>
      </text:list>
      <text:h text:style-name="Heading_20_2" text:outline-level="2">3. Environnement de Travail</text:h>
      <text:list text:style-name="L2">
        <text:list-item>
          <text:p text:style-name="P5"><text:span text:style-name="Strong_20_Emphasis">Serveur DNS primaire</text:span> : 192.168.224.53 </text:p>
        </text:list-item>
        <text:list-item>
          <text:p text:style-name="P5"><text:span text:style-name="Strong_20_Emphasis">Serveur DNS secondaire</text:span> : 192.168.224.57 </text:p>
        </text:list-item>
        <text:list-item>
          <text:p text:style-name="P4"><text:span text:style-name="Strong_20_Emphasis">Client de test</text:span> : Une machine distante configurée pour utiliser les serveurs DNS. </text:p>
        </text:list-item>
      </text:list>
      <text:h text:style-name="Heading_20_2" text:outline-level="2">4. Configuration du Serveur DNS Primaire</text:h>
      <text:h text:style-name="Heading_20_3" text:outline-level="3">4.1 Installation</text:h>
      <text:p text:style-name="Text_20_body">La configuration du serveur primaire utilise <text:span text:style-name="Strong_20_Emphasis">BIND9</text:span>. Commande pour installer BIND9 :</text:p>
      <text:p text:style-name="Preformatted_20_Text"><text:span text:style-name="Source_20_Text">sudo apt update</text:span></text:p>
      <text:p text:style-name="P1"><text:span text:style-name="Source_20_Text">sudo apt install bind9</text:span></text:p>
      <text:h text:style-name="Heading_20_3" text:outline-level="3">4.2 Configuration des Zones DNS</text:h>
      <text:p text:style-name="Text_20_body">Fichier : <text:span text:style-name="Source_20_Text">/etc/bind/named.conf.local</text:span></text:p>
      <text:p text:style-name="Preformatted_20_Text"><text:span text:style-name="Source_20_Text">zone "m1.uasz.sn" {</text:span></text:p>
      <text:p text:style-name="Preformatted_20_Text"><text:span text:style-name="Source_20_Text"><text:s text:c="4"/>type master;</text:span></text:p>
      <text:p text:style-name="Preformatted_20_Text"><text:span text:style-name="Source_20_Text"><text:s text:c="4"/>file "/etc/bind/db.m1.uasz.sn";</text:span></text:p>
      <text:p text:style-name="Preformatted_20_Text"><text:span text:style-name="Source_20_Text"><text:s text:c="4"/>allow-transfer { 192.168.224.57; };</text:span></text:p>
      <text:p text:style-name="P1"><text:span text:style-name="Source_20_Text">};</text:span></text:p>
      <text:p text:style-name="Text_20_body">Fichier de zone : <text:span text:style-name="Source_20_Text">/etc/bind/db.m1.uasz.sn</text:span></text:p>
      <text:p text:style-name="Preformatted_20_Text"><text:span text:style-name="Source_20_Text">$TTL <text:s text:c="3"/>604800</text:span></text:p>
      <text:p text:style-name="Preformatted_20_Text"><text:span text:style-name="Source_20_Text">@ <text:s text:c="6"/>IN <text:s text:c="5"/>SOA <text:s text:c="4"/>m1.uasz.sn. root.m1.uasz.sn. (</text:span></text:p>
      <text:p text:style-name="Preformatted_20_Text"><text:span text:style-name="Source_20_Text"><text:s text:c="30"/>2 <text:s text:c="8"/>; Serial</text:span></text:p>
      <text:p text:style-name="Preformatted_20_Text"><text:span text:style-name="Source_20_Text"><text:s text:c="25"/>604800 <text:s text:c="8"/>; Refresh</text:span></text:p>
      <text:p text:style-name="Preformatted_20_Text"><text:span text:style-name="Source_20_Text"><text:s text:c="26"/>86400 <text:s text:c="8"/>; Retry</text:span></text:p>
      <text:p text:style-name="Preformatted_20_Text"><text:span text:style-name="Source_20_Text"><text:s text:c="24"/>2419200 <text:s text:c="8"/>; Expire</text:span></text:p>
      <text:p text:style-name="Preformatted_20_Text"><text:span text:style-name="Source_20_Text"><text:s text:c="25"/>604800 ) <text:s text:c="6"/>; Negative Cache TTL</text:span></text:p>
      <text:p text:style-name="Preformatted_20_Text"><text:span text:style-name="Source_20_Text">@ <text:s text:c="6"/>IN <text:s text:c="5"/>NS <text:s text:c="5"/>ns.m1.uasz.sn.</text:span></text:p>
      <text:p text:style-name="Preformatted_20_Text"><text:span text:style-name="Source_20_Text">@ <text:s text:c="6"/>IN <text:s text:c="5"/>A <text:s text:c="6"/>192.168.224.53</text:span></text:p>
      <text:p text:style-name="P1"><text:span text:style-name="Source_20_Text">ns <text:s text:c="5"/>IN <text:s text:c="5"/>A <text:s text:c="6"/>192.168.224.53</text:span></text:p>
      <text:p text:style-name="Text_20_body"><text:soft-page-break/>Redémarrer le service DNS :</text:p>
      <text:p text:style-name="P1"><text:span text:style-name="Source_20_Text">sudo systemctl restart bind9</text:span></text:p>
      <text:h text:style-name="Heading_20_3" text:outline-level="3">4.3 Configuration de Sécurité</text:h>
      <text:p text:style-name="Text_20_body">Le port 53 est ouvert sur le pare-feu :</text:p>
      <text:p text:style-name="P1"><text:span text:style-name="Source_20_Text">sudo ufw allow 53</text:span></text:p>
      <text:h text:style-name="Heading_20_2" text:outline-level="2">5. Configuration du Serveur DNS Secondaire</text:h>
      <text:h text:style-name="Heading_20_3" text:outline-level="3">5.1 Installation</text:h>
      <text:p text:style-name="Text_20_body">Installation similaire au serveur primaire avec BIND9.</text:p>
      <text:h text:style-name="Heading_20_3" text:outline-level="3">5.2 Configuration des Zones DNS</text:h>
      <text:p text:style-name="Text_20_body">Fichier : <text:span text:style-name="Source_20_Text">/etc/bind/named.conf.local</text:span></text:p>
      <text:p text:style-name="Preformatted_20_Text"><text:span text:style-name="Source_20_Text">zone "m1.uasz.sn" {</text:span></text:p>
      <text:p text:style-name="Preformatted_20_Text"><text:span text:style-name="Source_20_Text"><text:s text:c="4"/>type slave;</text:span></text:p>
      <text:p text:style-name="Preformatted_20_Text"><text:span text:style-name="Source_20_Text"><text:s text:c="4"/>file "/var/cache/bind/db.m1.uasz.sn";</text:span></text:p>
      <text:p text:style-name="Preformatted_20_Text"><text:span text:style-name="Source_20_Text"><text:s text:c="4"/>masters { 192.168.224.53; };</text:span></text:p>
      <text:p text:style-name="P1"><text:span text:style-name="Source_20_Text">};</text:span></text:p>
      <text:p text:style-name="Text_20_body">Redémarrage du service :</text:p>
      <text:p text:style-name="P1"><text:span text:style-name="Source_20_Text">sudo systemctl restart bind9</text:span></text:p>
      <text:h text:style-name="Heading_20_2" text:outline-level="2">6. Configuration du Client</text:h>
      <text:p text:style-name="Text_20_body">Le fichier <text:span text:style-name="Source_20_Text">/etc/resolv.conf</text:span> sur le client contient :</text:p>
      <text:p text:style-name="Preformatted_20_Text"><text:span text:style-name="Source_20_Text">nameserver 192.168.224.57</text:span></text:p>
      <text:p text:style-name="P1"><text:span text:style-name="Source_20_Text">nameserver 192.168.224.53</text:span></text:p>
      <text:h text:style-name="Heading_20_2" text:outline-level="2">7. Tests et Vérifications</text:h>
      <text:h text:style-name="Heading_20_3" text:outline-level="3">7.1 Test de Résolution avec <text:span text:style-name="Source_20_Text">dig</text:span></text:h>
      <text:p text:style-name="Text_20_body">Commande exécutée sur le client :</text:p>
      <text:p text:style-name="P1"><text:span text:style-name="Source_20_Text">dig @192.168.224.57 ns.m1.uasz.sn</text:span></text:p>
      <text:h text:style-name="Heading_20_3" text:outline-level="3">Résultat :</text:h>
      <text:p text:style-name="Text_20_body">Le serveur secondaire a répondu avec succès, confirmant la synchronisation des données avec le serveur primaire.</text:p>
      <text:h text:style-name="Heading_20_3" text:outline-level="3">7.2 Test de Continuité</text:h>
      <text:p text:style-name="Text_20_body">Après l'arrêt du serveur primaire, le serveur secondaire a continué à répondre aux requêtes, démontrant la résilience du système.</text:p>
      <text:h text:style-name="Heading_20_2" text:outline-level="2"><text:soft-page-break/>8. Conclusion</text:h>
      <text:p text:style-name="Text_20_body">Cette configuration fournit une redondance DNS efficace, garantissant la continuité du service même si le serveur primaire est indisponible. Le bon fonctionnement a été validé à l'aide de plusieurs tests de résolu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6T15:04:43.140497349</meta:creation-date>
    <dc:date>2025-01-06T15:05:58.011100105</dc:date>
    <meta:editing-duration>PT1M17S</meta:editing-duration>
    <meta:editing-cycles>1</meta:editing-cycles>
    <meta:document-statistic meta:table-count="0" meta:image-count="0" meta:object-count="0" meta:page-count="3" meta:paragraph-count="65" meta:word-count="383" meta:character-count="2790" meta:non-whitespace-character-count="2213"/>
    <meta:generator>LibreOffice/24.2.6.2$Linux_X86_64 LibreOffice_project/420$Build-2</meta:generator>
  </office:meta>
</office:document-meta>
</file>