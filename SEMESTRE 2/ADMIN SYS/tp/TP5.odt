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text-properties officeooo:rsid="00073ee4" officeooo:paragraph-rsid="00073ee4"/>
    </style:style>
    <style:style style:name="P2" style:family="paragraph" style:parent-style-name="Text_20_body" style:list-style-name="L1">
      <style:text-properties officeooo:rsid="00073ee4" officeooo:paragraph-rsid="00073ee4"/>
    </style:style>
    <style:style style:name="P3" style:family="paragraph" style:parent-style-name="Text_20_body">
      <style:text-properties officeooo:rsid="0008aebc" officeooo:paragraph-rsid="0008aebc"/>
    </style:style>
    <style:style style:name="P4" style:family="paragraph" style:parent-style-name="Text_20_body" style:list-style-name="L2">
      <style:text-properties officeooo:rsid="0008aebc" officeooo:paragraph-rsid="0008aebc"/>
    </style:style>
    <style:style style:name="P5" style:family="paragraph" style:parent-style-name="Text_20_body" style:list-style-name="L3">
      <style:text-properties officeooo:rsid="0008aebc" officeooo:paragraph-rsid="0008aebc"/>
    </style:style>
    <style:style style:name="P6" style:family="paragraph" style:parent-style-name="Title">
      <style:text-properties officeooo:paragraph-rsid="00073ee4"/>
    </style:style>
    <style:style style:name="T1" style:family="text">
      <style:text-properties officeooo:rsid="00073ee4"/>
    </style:style>
    <text:list-style style:name="L1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1">TP N.5 : Installation d’une imprimante</text:span></text:p>
      <text:h text:style-name="P1" text:outline-level="1">Installation</text:h>
      <text:list text:style-name="L1">
        <text:list-item>
          <text:p text:style-name="P2">Identifier la marque</text:p>
        </text:list-item>
        <text:list-item>
          <text:p text:style-name="P2">Avoir le pilote sur CD ou clé USB</text:p>
        </text:list-item>
        <text:list-item>
          <text:p text:style-name="P2">Procéder au câblage</text:p>
        </text:list-item>
      </text:list>
      <text:h text:style-name="Heading_20_1" text:outline-level="1">Installation en Réseau</text:h>
      <text:list text:style-name="L2">
        <text:list-item>
          <text:p text:style-name="P4">S’assurer que d’abord l’imprimante possède une ou des cartes réseaux ;</text:p>
        </text:list-item>
      </text:list>
      <text:p text:style-name="P3">Dans notre cas, l’imprimante possède une carte réseau filaire.</text:p>
      <text:list text:style-name="L3">
        <text:list-item>
          <text:p text:style-name="P5">Procéder a la préparation du support de transmission (cables reseaux) ;</text:p>
        </text:list-item>
        <text:list-item>
          <text:p text:style-name="P5"/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10T17:36:24.806256421</meta:creation-date>
    <dc:date>2025-07-10T21:31:08.947535405</dc:date>
    <meta:editing-duration>PT3H27M54S</meta:editing-duration>
    <meta:editing-cycles>2</meta:editing-cycles>
    <meta:generator>LibreOffice/24.2.7.2$Linux_X86_64 LibreOffice_project/420$Build-2</meta:generator>
    <meta:print-date>2025-07-10T17:47:32.990294427</meta:print-date>
    <meta:document-statistic meta:table-count="0" meta:image-count="0" meta:object-count="0" meta:page-count="1" meta:paragraph-count="10" meta:word-count="61" meta:character-count="353" meta:non-whitespace-character-count="307"/>
  </office:meta>
</office:document-meta>
</file>