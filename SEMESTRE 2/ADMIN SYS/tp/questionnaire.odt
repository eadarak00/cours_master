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</office:font-face-decls>
  <office:automatic-styles>
    <style:style style:name="P1" style:family="paragraph" style:parent-style-name="Standard" style:list-style-name="L1">
      <style:paragraph-properties fo:margin-top="0.101cm" fo:margin-bottom="0.101cm" style:contextual-spacing="false" fo:line-height="150%"/>
    </style:style>
    <style:style style:name="T1" style:family="text">
      <style:text-properties officeooo:rsid="001e5852"/>
    </style:style>
    <style:style style:name="T2" style:family="text">
      <style:text-properties officeooo:rsid="0020193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Expliquer la différence entre un rôle et un service de rôle ?</text:p>
        </text:list-item>
        <text:list-item>
          <text:p text:style-name="P1">Citer 4 rôles existant sur un serveur core ?</text:p>
        </text:list-item>
        <text:list-item>
          <text:p text:style-name="P1">Citer un rôle qui n’est pas présent sur une édition <text:s/>standard ?</text:p>
        </text:list-item>
        <text:list-item>
          <text:p text:style-name="P1">Quel rôle faut-il installer pour configurer un service NAP?</text:p>
        </text:list-item>
        <text:list-item>
          <text:p text:style-name="P1">Un de vos collaborateurs recherche en vain le gestionnaire de serveur, que pouvez vous lui répondre ?</text:p>
        </text:list-item>
        <text:list-item>
          <text:p text:style-name="P1">Comment feriez vous pour administrer a distance un serveur windows 2008 a partir d’un station windows XP ?</text:p>
        </text:list-item>
        <text:list-item>
          <text:p text:style-name="P1">Comment feriez vous pour administrer a distance un serveur windows 2008 a partir d’un station windows <text:span text:style-name="T1">VISTA</text:span>?</text:p>
        </text:list-item>
        <text:list-item>
          <text:p text:style-name="P1">Vous aimeriez installer plusieurs rôle<text:span text:style-name="T2">s</text:span> et fonctionnalités a l’aide d’un script.Vous écrivez une commande mais vous aimeriez la tester avant de l’exécuter, comment feriez vous ?</text:p>
        </text:list-item>
        <text:list-item>
          <text:p text:style-name="P1">Un de vos collègues doit installer un serveur hautement disponible comme serveur de base de données. Il propose d’utiliser la fonctionnalité WNLB. Que lui répondez­-vous ?</text:p>
        </text:list-item>
        <text:list-item>
          <text:p text:style-name="P1">Une de vos collègues s’interroge sur l’intérêt que peut avoir la fonctionnalité Expérience utilisateur. Quelle est votre réponse 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7:17:43.281529696</meta:creation-date>
    <dc:date>2025-07-21T20:04:26.540761658</dc:date>
    <meta:editing-duration>PT3H17M4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77" meta:character-count="1041" meta:non-whitespace-character-count="885"/>
  </office:meta>
</office:document-meta>
</file>