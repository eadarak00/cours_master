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break-before="page"/>
    </style:style>
    <style:style style:name="P2" style:family="paragraph" style:parent-style-name="Heading_20_2">
      <style:text-properties officeooo:rsid="001b2c04" officeooo:paragraph-rsid="00075a99"/>
    </style:style>
    <style:style style:name="P3" style:family="paragraph" style:parent-style-name="Heading_20_2">
      <style:text-properties officeooo:paragraph-rsid="00075a99"/>
    </style:style>
    <style:style style:name="P4" style:family="paragraph" style:parent-style-name="Heading_20_3">
      <style:text-properties officeooo:paragraph-rsid="00075a99"/>
    </style:style>
    <style:style style:name="P5" style:family="paragraph" style:parent-style-name="Horizontal_20_Line">
      <style:text-properties officeooo:paragraph-rsid="00075a99"/>
    </style:style>
    <style:style style:name="P6" style:family="paragraph" style:parent-style-name="Text_20_body" style:list-style-name="L2">
      <style:text-properties officeooo:paragraph-rsid="00075a99"/>
    </style:style>
    <style:style style:name="P7" style:family="paragraph" style:parent-style-name="Text_20_body" style:list-style-name="L6">
      <style:text-properties officeooo:paragraph-rsid="00075a99"/>
    </style:style>
    <style:style style:name="P8" style:family="paragraph" style:parent-style-name="Text_20_body" style:list-style-name="L7">
      <style:text-properties officeooo:paragraph-rsid="00075a99"/>
    </style:style>
    <style:style style:name="P9" style:family="paragraph" style:parent-style-name="Text_20_body" style:list-style-name="L8">
      <style:text-properties officeooo:paragraph-rsid="00075a99"/>
    </style:style>
    <style:style style:name="P10" style:family="paragraph" style:parent-style-name="Text_20_body" style:list-style-name="L9">
      <style:text-properties officeooo:paragraph-rsid="00075a99"/>
    </style:style>
    <style:style style:name="P11" style:family="paragraph" style:parent-style-name="Text_20_body">
      <style:text-properties officeooo:paragraph-rsid="00075a9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Réseaux – Serveur TCP multi-clients en C avec <text:span text:style-name="Source_20_Text">poll()</text:span></text:p>
      <text:h text:style-name="P4" text:outline-level="3">🎯 Objectif</text:h>
      <text:p text:style-name="P11">Créer une application en C composée :</text:p>
      <text:list text:style-name="L2">
        <text:list-item>
          <text:p text:style-name="P6">d’un <text:span text:style-name="Strong_20_Emphasis">serveur TCP</text:span> capable de gérer plusieurs clients en simultané à l’aide de la fonction <text:span text:style-name="Source_20_Text">poll()</text:span>.</text:p>
        </text:list-item>
        <text:list-item>
          <text:p text:style-name="P6">d’un <text:span text:style-name="Strong_20_Emphasis">client TCP</text:span> qui se connecte au serveur et reçoit un message de bienvenue.</text:p>
        </text:list-item>
      </text:list>
      <text:h text:style-name="P3" text:outline-level="2">Partie Serveur – Gestion multi-clients avec <text:span text:style-name="Source_20_Text">poll()</text:span></text:h>
      <text:h text:style-name="P4" text:outline-level="3"><text:s/>Comportement attendu</text:h>
      <text:list text:style-name="L6">
        <text:list-item>
          <text:p text:style-name="P7">Le serveur crée un socket et l’associe à un port avec <text:span text:style-name="Source_20_Text">bind()</text:span>.</text:p>
        </text:list-item>
        <text:list-item>
          <text:p text:style-name="P7">Il se met en attente de connexions avec <text:span text:style-name="Source_20_Text">listen()</text:span>.</text:p>
        </text:list-item>
        <text:list-item>
          <text:p text:style-name="P7">Il utilise la fonction <text:span text:style-name="Source_20_Text">poll()</text:span> pour surveiller à la fois :</text:p>
          <text:list>
            <text:list-item>
              <text:p text:style-name="P7">le socket principal (pour détecter les nouvelles connexions),</text:p>
            </text:list-item>
            <text:list-item>
              <text:p text:style-name="P7">et les sockets clients (pour surveiller les échanges de messages).</text:p>
            </text:list-item>
          </text:list>
        </text:list-item>
        <text:list-item>
          <text:p text:style-name="P7">Lorsqu’un client se connecte :</text:p>
          <text:list>
            <text:list-item>
              <text:p text:style-name="P7">le serveur accepte la connexion avec <text:span text:style-name="Source_20_Text">accept()</text:span>,</text:p>
            </text:list-item>
            <text:list-item>
              <text:p text:style-name="P7">ajoute le socket du client dans la liste surveillée par <text:span text:style-name="Source_20_Text">poll()</text:span>,</text:p>
            </text:list-item>
            <text:list-item>
              <text:p text:style-name="P7">et lui envoie un message de bienvenue.</text:p>
            </text:list-item>
          </text:list>
        </text:list-item>
        <text:list-item>
          <text:p text:style-name="P7">Le serveur peut ensuite recevoir des messages des différents clients et leur répondre si nécessaire.</text:p>
        </text:list-item>
      </text:list>
      <text:h text:style-name="P4" text:outline-level="3" text:is-list-header="true"><text:s/>Contraintes techniques</text:h>
      <text:list text:style-name="L7">
        <text:list-item>
          <text:p text:style-name="P8">Utiliser la structure <text:span text:style-name="Source_20_Text">pollfd[]</text:span> pour gérer plusieurs descripteurs.</text:p>
        </text:list-item>
        <text:list-item>
          <text:p text:style-name="P8">Limiter à un nombre fixe de clients (ex. : <text:span text:style-name="Source_20_Text">#define MAX_CLIENTS 10</text:span>).</text:p>
        </text:list-item>
        <text:list-item>
          <text:p text:style-name="P8">Ajouter dynamiquement chaque nouveau client dans la liste.</text:p>
        </text:list-item>
        <text:list-item>
          <text:p text:style-name="P8">Supprimer un client si sa connexion est fermée.</text:p>
        </text:list-item>
      </text:list>
      <text:p text:style-name="P5"/>
      <text:h text:style-name="P3" text:outline-level="2"><text:soft-page-break/>🖥️ Partie Client – Connexion au serveur</text:h>
      <text:h text:style-name="P4" text:outline-level="3">🔧 Comportement attendu</text:h>
      <text:list text:style-name="L8">
        <text:list-item>
          <text:p text:style-name="P9">Le client crée un socket avec <text:span text:style-name="Source_20_Text">socket()</text:span>.</text:p>
        </text:list-item>
        <text:list-item>
          <text:p text:style-name="P9">Il se connecte au serveur avec <text:span text:style-name="Source_20_Text">connect()</text:span>.</text:p>
        </text:list-item>
        <text:list-item>
          <text:p text:style-name="P9">Il affiche le message de bienvenue reçu du serveur.</text:p>
        </text:list-item>
        <text:list-item>
          <text:p text:style-name="P9">(Optionnel) Il peut ensuite envoyer un message au serveur.</text:p>
        </text:list-item>
      </text:list>
      <text:h text:style-name="P2" text:outline-level="2">Bonus possibles (optionnels)</text:h>
      <text:list text:style-name="L9">
        <text:list-item>
          <text:p text:style-name="P10">Gérer la saisie utilisateur côté client pour envoyer des messages au serveur.</text:p>
        </text:list-item>
        <text:list-item>
          <text:p text:style-name="P10">Permettre au serveur de diffuser un message à <text:span text:style-name="Strong_20_Emphasis">tous les clients connectés</text:span>.</text:p>
        </text:list-item>
        <text:list-item>
          <text:p text:style-name="P10">Journaliser les connexions/déconnexions sur le serveu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6:09:58.918585447</meta:creation-date>
    <dc:date>2025-07-18T16:10:20.363630026</dc:date>
    <meta:editing-duration>PT22S</meta:editing-duration>
    <meta:editing-cycles>1</meta:editing-cycles>
    <meta:document-statistic meta:table-count="0" meta:image-count="0" meta:object-count="0" meta:page-count="2" meta:paragraph-count="32" meta:word-count="286" meta:character-count="1691" meta:non-whitespace-character-count="1455"/>
    <meta:generator>LibreOffice/24.2.7.2$Linux_X86_64 LibreOffice_project/420$Build-2</meta:generator>
  </office:meta>
</office:document-meta>
</file>