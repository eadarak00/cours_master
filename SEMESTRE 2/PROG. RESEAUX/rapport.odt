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Technique : Serveur de Chat et Client en C</text:p>
      <text:p text:style-name="Standard"/>
      <text:h text:style-name="Heading_20_1" text:outline-level="1">1. Introduction</text:h>
      <text:p text:style-name="Standard"/>
      <text:p text:style-name="Standard">Ce projet consiste en un système client-serveur permettant à plusieurs utilisateurs de communiquer via un chat en temps réel. Le serveur gère les connexions multiples et relaie les messages entre clients, tandis que le client permet aux utilisateurs de se connecter et d'échanger des messages.</text:p>
      <text:p text:style-name="Standard"/>
      <text:h text:style-name="Heading_20_1" text:outline-level="1">2. Architecture Globale</text:h>
      <text:p text:style-name="Standard"/>
      <text:p text:style-name="Standard">Le système suit une architecture client-serveur classique :</text:p>
      <text:p text:style-name="Standard">- **Serveur** : Centralise les communications, gère les connexions/déconnexions et diffuse les messages</text:p>
      <text:p text:style-name="Standard">- **Client** : Se connecte au serveur et permet à l'utilisateur d'envoyer/recevoir des messages</text:p>
      <text:p text:style-name="Standard"/>
      <text:p text:style-name="Standard">Protocole : TCP/IP sur le port 8084</text:p>
      <text:p text:style-name="Standard"/>
      <text:h text:style-name="Heading_20_1" text:outline-level="1">3. Détails du Serveur</text:h>
      <text:p text:style-name="Standard"/>
      <text:h text:style-name="Heading_20_2" text:outline-level="2">3.1. Structures de Données</text:h>
      <text:p text:style-name="Standard"/>
      <text:p text:style-name="Standard">```c</text:p>
      <text:p text:style-name="Standard">typedef struct {</text:p>
      <text:p text:style-name="Standard"><text:s text:c="4"/>int fd; <text:s text:c="20"/>// Descripteur de fichier du socket client</text:p>
      <text:p text:style-name="Standard"><text:s text:c="4"/>char pseudo[PSEUDO_LEN]; <text:s text:c="3"/>// Pseudonyme du client (max 31 caractères)</text:p>
      <text:p text:style-name="Standard">} Client;</text:p>
      <text:p text:style-name="Standard"/>
      <text:p text:style-name="Standard">Client clients[MAX_CLIENTS]; <text:s text:c="3"/>// Tableau des clients connectés</text:p>
      <text:p text:style-name="Standard">```</text:p>
      <text:p text:style-name="Standard"/>
      <text:h text:style-name="Heading_20_2" text:outline-level="2">3.2. Initialisation</text:h>
      <text:p text:style-name="Standard"/>
      <text:p text:style-name="Standard">1. Création du socket serveur en TCP</text:p>
      <text:p text:style-name="Standard">2. Configuration de l'adresse (écoute sur toutes les interfaces, port 8084)</text:p>
      <text:p text:style-name="Standard">3. Bind et mise en écoute</text:p>
      <text:p text:style-name="Standard"/>
      <text:h text:style-name="Heading_20_2" text:outline-level="2"><text:soft-page-break/>3.3. Gestion des Connexions</text:h>
      <text:p text:style-name="Standard"/>
      <text:p text:style-name="Standard">Le serveur utilise `poll()` pour gérer efficacement les E/S multiples :</text:p>
      <text:p text:style-name="Standard">- Surveille à la fois le socket serveur (nouvelles connexions) et les sockets clients (messages entrants)</text:p>
      <text:p text:style-name="Standard">- Permet de gérer jusqu'à 10 clients simultanément</text:p>
      <text:p text:style-name="Standard"/>
      <text:h text:style-name="Heading_20_2" text:outline-level="2">3.4. Workflow Principal</text:h>
      <text:p text:style-name="Standard"/>
      <text:p text:style-name="Standard">1. **Nouvelle connexion** :</text:p>
      <text:p text:style-name="Standard"><text:s text:c="3"/>- Accepte la connexion</text:p>
      <text:p text:style-name="Standard"><text:s text:c="3"/>- Trouve un slot libre dans le tableau des clients</text:p>
      <text:p text:style-name="Standard"><text:s text:c="3"/>- Demande un pseudonyme au client</text:p>
      <text:p text:style-name="Standard"/>
      <text:p text:style-name="Standard">2. **Réception de message** :</text:p>
      <text:p text:style-name="Standard"><text:s text:c="3"/>- Si le client n'a pas encore de pseudo, le premier message reçu devient son pseudo</text:p>
      <text:p text:style-name="Standard"><text:s text:c="3"/>- Pour les messages suivants, le serveur ajoute le pseudo et diffuse à tous les autres clients</text:p>
      <text:p text:style-name="Standard"/>
      <text:p text:style-name="Standard">3. **Déconnexion** :</text:p>
      <text:p text:style-name="Standard"><text:s text:c="3"/>- Nettoie les structures de données</text:p>
      <text:p text:style-name="Standard"><text:s text:c="3"/>- Ferme le socket</text:p>
      <text:p text:style-name="Standard"/>
      <text:h text:style-name="Heading_20_1" text:outline-level="1">4. Détails du Client</text:h>
      <text:p text:style-name="Standard"/>
      <text:h text:style-name="Heading_20_2" text:outline-level="2">4.1. Initialisation</text:h>
      <text:p text:style-name="Standard"/>
      <text:p text:style-name="Standard">1. Création du socket TCP</text:p>
      <text:p text:style-name="Standard">2. Connexion au serveur (localhost:8084 par défaut)</text:p>
      <text:p text:style-name="Standard"/>
      <text:h text:style-name="Heading_20_2" text:outline-level="2">4.2. Workflow Principal</text:h>
      <text:p text:style-name="Standard"/>
      <text:p text:style-name="Standard">1. **Authentification** :</text:p>
      <text:p text:style-name="Standard"><text:s text:c="3"/>- Réception de la demande de pseudo</text:p>
      <text:p text:style-name="Standard"><text:s text:c="3"/>- Envoi du pseudonyme saisi par l'utilisateur</text:p>
      <text:p text:style-name="Standard"/>
      <text:p text:style-name="Standard">2. **Communication** :</text:p>
      <text:p text:style-name="Standard"><text:s text:c="3"/>- Utilise `poll()` pour surveiller simultanément :</text:p>
      <text:p text:style-name="Standard"><text:s text:c="5"/>- L'entrée standard (clavier) pour les messages à envoyer</text:p>
      <text:p text:style-name="Standard"><text:s text:c="5"/>- Le socket réseau pour les messages reçus</text:p>
      <text:p text:style-name="Standard"><text:s text:c="3"/>- La commande "exit" permet de quitter proprement</text:p>
      <text:p text:style-name="Standard"/>
      <text:h text:style-name="Heading_20_1" text:outline-level="1">5. Protocole de Communication</text:h>
      <text:p text:style-name="Standard"/>
      <text:p text:style-name="Standard"><text:soft-page-break/>1. **Étape 1 (Connexion)** :</text:p>
      <text:p text:style-name="Standard"><text:s text:c="3"/>- Serveur → Client : "Entrez votre pseudo (max 31 caractères) : "</text:p>
      <text:p text:style-name="Standard"><text:s text:c="3"/>- Client → Serveur : "pseudo\n"</text:p>
      <text:p text:style-name="Standard"/>
      <text:p text:style-name="Standard">2. **Étape 2 (Chat)** :</text:p>
      <text:p text:style-name="Standard"><text:s text:c="3"/>- Serveur → Client : "Bienvenue pseudo ! Vous pouvez maintenant envoyer des messages.\n"</text:p>
      <text:p text:style-name="Standard"><text:s text:c="3"/>- Tous les messages suivants sont formatés : "pseudo : message\n"</text:p>
      <text:p text:style-name="Standard"/>
      <text:h text:style-name="Heading_20_1" text:outline-level="1">6. Mécanismes Clés</text:h>
      <text:p text:style-name="Standard"/>
      <text:h text:style-name="Heading_20_2" text:outline-level="2">6.1. Gestion Multi-clients</text:h>
      <text:p text:style-name="Standard"/>
      <text:p text:style-name="Standard">Le serveur utilise :</text:p>
      <text:p text:style-name="Standard">- `poll()` pour une surveillance efficace des multiples sockets</text:p>
      <text:p text:style-name="Standard">- Un tableau de structures Client pour suivre l'état de chaque connexion</text:p>
      <text:p text:style-name="Standard">- Un broadcast simple pour diffuser les messages à tous sauf l'émetteur</text:p>
      <text:p text:style-name="Standard"/>
      <text:h text:style-name="Heading_20_2" text:outline-level="2">6.2. Synchronisation</text:h>
      <text:p text:style-name="Standard"/>
      <text:p text:style-name="Standard">Aucun verrou n'est nécessaire car :</text:p>
      <text:p text:style-name="Standard">- Un seul thread gère toutes les connexions</text:p>
      <text:p text:style-name="Standard">- `poll()` garantit que les E/S sont gérées séquentiellement</text:p>
      <text:p text:style-name="Standard"/>
      <text:h text:style-name="Heading_20_1" text:outline-level="1">7. Limitations et Améliorations Possibles</text:h>
      <text:p text:style-name="Standard"/>
      <text:h text:style-name="Heading_20_2" text:outline-level="2">7.1. Limitations Actuelles</text:h>
      <text:p text:style-name="Standard"/>
      <text:p text:style-name="Standard">- Nombre maximal de clients fixe (10)</text:p>
      <text:p text:style-name="Standard">- Pas de chiffrement des communications</text:p>
      <text:p text:style-name="Standard">- Gestion basique des erreurs</text:p>
      <text:p text:style-name="Standard">- Pas d'historique des messages</text:p>
      <text:p text:style-name="Standard">- Pseudonymes non uniques</text:p>
      <text:p text:style-name="Standard"/>
      <text:h text:style-name="Heading_20_2" text:outline-level="2">7.2. Améliorations Possibles</text:h>
      <text:p text:style-name="Standard"/>
      <text:p text:style-name="Standard">1. **Sécurité** :</text:p>
      <text:p text:style-name="Standard"><text:s text:c="3"/>- Ajouter une authentification sécurisée</text:p>
      <text:p text:style-name="Standard"><text:s text:c="3"/>- Chiffrement TLS</text:p>
      <text:p text:style-name="Standard"/>
      <text:p text:style-name="Standard">2. **Fonctionnalités** :</text:p>
      <text:p text:style-name="Standard"><text:s text:c="3"/>- Salons de discussion</text:p>
      <text:p text:style-name="Standard"><text:s text:c="3"/>- Commandes serveur (/kick, /ban)</text:p>
      <text:p text:style-name="Standard"><text:s text:c="3"/>- Historique des messages</text:p>
      <text:p text:style-name="Standard"><text:soft-page-break/><text:s text:c="3"/>- Notification de présence (join/leave)</text:p>
      <text:p text:style-name="Standard"/>
      <text:p text:style-name="Standard">3. **Performance** :</text:p>
      <text:p text:style-name="Standard"><text:s text:c="3"/>- Passage à epoll() pour plus d'efficacité</text:p>
      <text:p text:style-name="Standard"><text:s text:c="3"/>- Gestion asynchrone des E/S</text:p>
      <text:p text:style-name="Standard"/>
      <text:h text:style-name="Heading_20_1" text:outline-level="1">8. Mode d'Emploi</text:h>
      <text:p text:style-name="Standard"/>
      <text:h text:style-name="Heading_20_2" text:outline-level="2">8.1. Compilation</text:h>
      <text:p text:style-name="Standard"/>
      <text:p text:style-name="Standard">```bash</text:p>
      <text:p text:style-name="Standard"><text:s/>Serveur</text:p>
      <text:p text:style-name="Standard">gcc serveur.c -o serveur -Wall</text:p>
      <text:p text:style-name="Standard"/>
      <text:p text:style-name="Standard"><text:s/>Client</text:p>
      <text:p text:style-name="Standard">gcc client.c -o client -Wall</text:p>
      <text:p text:style-name="Standard">```</text:p>
      <text:p text:style-name="Standard"/>
      <text:h text:style-name="Heading_20_2" text:outline-level="2">8.2. Exécution</text:h>
      <text:p text:style-name="Standard"/>
      <text:p text:style-name="Standard">1. Démarrer le serveur :</text:p>
      <text:p text:style-name="Standard">```bash</text:p>
      <text:p text:style-name="Standard">./serveur</text:p>
      <text:p text:style-name="Standard">```</text:p>
      <text:p text:style-name="Standard"/>
      <text:p text:style-name="Standard">2. Démarrer un ou plusieurs clients :</text:p>
      <text:p text:style-name="Standard">```bash</text:p>
      <text:p text:style-name="Standard">./client</text:p>
      <text:p text:style-name="Standard">```</text:p>
      <text:p text:style-name="Standard"/>
      <text:h text:style-name="Heading_20_1" text:outline-level="1">9. Conclusion</text:h>
      <text:p text:style-name="Standard"/>
      <text:p text:style-name="Standard">Ce projet démontre les principes fondamentaux des sockets TCP et de la programmation réseau en C. Bien que simple, il fournit une base solide pour comprendre les systèmes client-serveur et pourrait être étendu pour créer une application de chat plus complè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8T23:30:54.947071839</meta:creation-date>
    <dc:date>2025-07-18T23:34:05.544580905</dc:date>
    <meta:editing-duration>PT3M15S</meta:editing-duration>
    <meta:editing-cycles>1</meta:editing-cycles>
    <meta:document-statistic meta:table-count="0" meta:image-count="0" meta:object-count="0" meta:page-count="4" meta:paragraph-count="104" meta:word-count="651" meta:character-count="4167" meta:non-whitespace-character-count="3505"/>
    <meta:generator>LibreOffice/24.2.7.2$Linux_X86_64 LibreOffice_project/420$Build-2</meta:generator>
  </office:meta>
</office:document-meta>
</file>