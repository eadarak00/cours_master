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T1" style:family="text">
      <style:text-properties officeooo:rsid="00081c12"/>
    </style:style>
    <style:style style:name="T2" style:family="text">
      <style:text-properties officeooo:rsid="000b814c"/>
    </style:style>
    <style:style style:name="T3" style:family="text">
      <style:text-properties fo:font-variant="normal" fo:text-transform="none" fo:color="#f8faff" loext:opacity="100%" style:font-name="quote-cjk-patch" fo:font-size="16.5pt" fo:letter-spacing="normal" fo:font-style="normal" fo:font-weight="normal"/>
    </style:style>
    <style:style style:name="T4" style:family="text">
      <style:text-properties fo:font-variant="normal" fo:text-transform="none" style:font-name="quote-cjk-patch" fo:font-size="16.5pt" fo:letter-spacing="normal" fo:font-style="normal"/>
    </style:style>
    <style:style style:name="T5" style:family="text">
      <style:text-properties fo:font-variant="normal" fo:text-transform="none" style:font-name="quote-cjk-patch" fo:font-size="16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print 1 (Setup de base)</text:h>
      <text:h text:style-name="Heading_20_2" text:outline-level="2">1. Déclarations principales</text:h>
      <text:list text:style-name="L1">
        <text:list-item>
          <text:p text:style-name="P3"><text:span text:style-name="Source_20_Text">server_fd</text:span> : descripteur de la socket serveur.</text:p>
        </text:list-item>
      </text:list>
      <text:list text:style-name="L2">
        <text:list-item>
          <text:p text:style-name="P4"><text:span text:style-name="Source_20_Text">client_fd</text:span> : descripteur de la socket client créée lors d'une connexion.</text:p>
        </text:list-item>
      </text:list>
      <text:list text:style-name="L3">
        <text:list-item>
          <text:p text:style-name="P5"><text:span text:style-name="Source_20_Text">server_addr</text:span> : structure qui contiendra l’adresse IP + port du serveur.</text:p>
        </text:list-item>
      </text:list>
      <text:list text:style-name="L4">
        <text:list-item>
          <text:p text:style-name="P6"><text:span text:style-name="Source_20_Text">client_addr</text:span> : structure qui contiendra l’adresse du client qui se connecte.</text:p>
        </text:list-item>
      </text:list>
      <text:list text:style-name="L5">
        <text:list-item>
          <text:p text:style-name="P7"><text:span text:style-name="Source_20_Text">client_len</text:span> : taille de la structure client, nécessaire à <text:span text:style-name="Source_20_Text">accept()</text:span>.</text:p>
        </text:list-item>
      </text:list>
      <text:list text:style-name="L6">
        <text:list-item>
          <text:p text:style-name="P8"><text:span text:style-name="Source_20_Text">message</text:span> : chaîne de caractères envoyée au client comme message de bienvenue.</text:p>
        </text:list-item>
      </text:list>
      <text:h text:style-name="Heading_20_2" text:outline-level="2">2. Création du socket serveur</text:h>
      <text:list text:style-name="L7">
        <text:list-item>
          <text:p text:style-name="P9"><text:span text:style-name="Source_20_Text">socket()</text:span> crée une socket TCP IPv4 (<text:span text:style-name="Source_20_Text">AF_INET</text:span>, <text:span text:style-name="Source_20_Text">SOCK_STREAM</text:span>).</text:p>
        </text:list-item>
        <text:list-item>
          <text:p text:style-name="P9">Si la création échoue (<text:span text:style-name="Source_20_Text">server_fd &lt; 0</text:span>), on affiche une erreur et on quitte.</text:p>
        </text:list-item>
      </text:list>
      <text:h text:style-name="Heading_20_2" text:outline-level="2"><text:span text:style-name="T1">3. </text:span>Préparation de l’adresse du serveur</text:h>
      <text:list text:style-name="L8">
        <text:list-item>
          <text:p text:style-name="P10">Initialise à zéro la structure <text:span text:style-name="Source_20_Text">server_addr</text:span> pour éviter des valeurs indéfinies.</text:p>
        </text:list-item>
      </text:list>
      <text:list text:style-name="L9">
        <text:list-item>
          <text:p text:style-name="P11"><text:span text:style-name="Source_20_Text">sin_family</text:span> : indique qu’on utilise IPv4.</text:p>
        </text:list-item>
      </text:list>
      <text:list text:style-name="L10">
        <text:list-item>
          <text:p text:style-name="P12"><text:span text:style-name="Source_20_Text">sin_addr.s_addr</text:span> : <text:span text:style-name="Source_20_Text">INADDR_ANY</text:span> signifie que le serveur accepte les connexions sur toutes ses interfaces réseau.</text:p>
        </text:list-item>
      </text:list>
      <text:list text:style-name="L11">
        <text:list-item>
          <text:p text:style-name="P13"><text:span text:style-name="Source_20_Text">sin_port</text:span> : définit le port d’écoute (ici 11000), converti au format réseau.</text:p>
        </text:list-item>
      </text:list>
      <text:h text:style-name="Heading_20_2" text:outline-level="2">4. Liaison de la socket à l’adresse</text:h>
      <text:list text:style-name="L12">
        <text:list-item>
          <text:p text:style-name="P14"><text:span text:style-name="Source_20_Text">bind()</text:span> associe la socket <text:span text:style-name="Source_20_Text">server_fd</text:span> à l’adresse IP et au port définis.</text:p>
        </text:list-item>
        <text:list-item>
          <text:p text:style-name="P14">Si échec, affiche une erreur, ferme la socket et quitte.</text:p>
        </text:list-item>
      </text:list>
      <text:h text:style-name="Heading_20_2" text:outline-level="2">5. Mise en écoute des connexions entrantes</text:h>
      <text:list text:style-name="L13">
        <text:list-item>
          <text:p text:style-name="P15"><text:span text:style-name="Source_20_Text">listen()</text:span> indique au système que cette socket va accepter des connexions entrantes.</text:p>
        </text:list-item>
      </text:list>
      <text:list text:style-name="L14">
        <text:list-item>
          <text:p text:style-name="P16">Le second paramètre <text:span text:style-name="Source_20_Text">1</text:span> indique la taille maximale de la file d’attente des connexions en attente (ici 1).</text:p>
        </text:list-item>
      </text:list>
      <text:list text:style-name="L15">
        <text:list-item>
          <text:p text:style-name="P17">En cas d’erreur, on affiche un message et on quitte.</text:p>
        </text:list-item>
      </text:list>
      <text:h text:style-name="Heading_20_2" text:outline-level="2">6. Acceptation d’une connexion client</text:h>
      <text:list text:style-name="L16">
        <text:list-item>
          <text:p text:style-name="P18"><text:span text:style-name="Source_20_Text">accept()</text:span> bloque et attend qu’un client se connecte.</text:p>
        </text:list-item>
      </text:list>
      <text:list text:style-name="L17">
        <text:list-item>
          <text:p text:style-name="P19"><text:soft-page-break/>À la connexion, il crée une nouvelle socket <text:span text:style-name="Source_20_Text">client_fd</text:span> pour communiquer avec ce client.</text:p>
        </text:list-item>
      </text:list>
      <text:list text:style-name="L18">
        <text:list-item>
          <text:p text:style-name="P20">Remplit <text:span text:style-name="Source_20_Text">client_addr</text:span> avec les informations sur le client.</text:p>
        </text:list-item>
      </text:list>
      <text:list text:style-name="L19">
        <text:list-item>
          <text:p text:style-name="P21">En cas d’échec, affiche une erreur et quitte.</text:p>
        </text:list-item>
      </text:list>
      <text:h text:style-name="Heading_20_2" text:outline-level="2">7. Notification qu’un client est connecté</text:h>
      <text:list text:style-name="L20">
        <text:list-item>
          <text:p text:style-name="P22">Affiche un message simple dans la console serveur.</text:p>
        </text:list-item>
      </text:list>
      <text:h text:style-name="Heading_20_2" text:outline-level="2">8. Envoi d’un message de bienvenue</text:h>
      <text:list text:style-name="L21">
        <text:list-item>
          <text:p text:style-name="P23"><text:span text:style-name="Source_20_Text">send()</text:span> envoie le message à la socket client.</text:p>
        </text:list-item>
      </text:list>
      <text:list text:style-name="L22">
        <text:list-item>
          <text:p text:style-name="P24">Affiche un message de confirmation dans la console serveur.</text:p>
        </text:list-item>
      </text:list>
      <text:h text:style-name="Heading_20_2" text:outline-level="2">9. Fermeture des connexions</text:h>
      <text:list text:style-name="L23">
        <text:list-item>
          <text:p text:style-name="P25">Ferme la connexion avec le client.</text:p>
        </text:list-item>
      </text:list>
      <text:list text:style-name="L24">
        <text:list-item>
          <text:p text:style-name="P26">Ferme la socket serveur.</text:p>
        </text:list-item>
      </text:list>
      <text:list text:style-name="L25">
        <text:list-item>
          <text:p text:style-name="P27">Affiche un message de fermeture propre.</text:p>
        </text:list-item>
      </text:list>
      <text:p text:style-name="Preformatted_20_Text"><text:line-break/></text:p>
      <text:h text:style-name="P1" text:outline-level="1"><text:span text:style-name="T2">Sprint 2 : </text:span><text:span text:style-name="T4">Intégration de poll()</text:span></text:h>
      <text:h text:style-name="Heading_20_2" text:outline-level="2">Contexte : Préparer l’adresse du serveur (avant <text:span text:style-name="Source_20_Text">bind()</text:span>)</text:h>
      <text:h text:style-name="Heading_20_3" text:outline-level="3">Détails ligne par ligne</text:h>
      <text:h text:style-name="Heading_20_4" text:outline-level="4"><text:span text:style-name="Source_20_Text">memset(&amp;server_addr, 0, sizeof(server_addr));</text:span></text:h>
      <text:p text:style-name="Text_20_body">Initialise toute la structure <text:span text:style-name="Source_20_Text">server_addr</text:span> à <text:span text:style-name="Strong_20_Emphasis">zéro</text:span>.</text:p>
      <text:list text:style-name="L26">
        <text:list-item>
          <text:p text:style-name="P28">Cela évite des valeurs indésirables dans les champs non définis.</text:p>
        </text:list-item>
        <text:list-item>
          <text:p text:style-name="P28">C’est une <text:span text:style-name="Strong_20_Emphasis">bonne pratique</text:span> en réseau.</text:p>
        </text:list-item>
      </text:list>
      <text:h text:style-name="Heading_20_4" text:outline-level="4"><text:span text:style-name="Source_20_Text">server_addr.sin_family = AF_INET;</text:span></text:h>
      <text:p text:style-name="Text_20_body">Définit la <text:span text:style-name="Strong_20_Emphasis">famille d’adresses</text:span> utilisée.</text:p>
      <text:list text:style-name="L27">
        <text:list-item>
          <text:p text:style-name="P29"><text:span text:style-name="Source_20_Text">AF_INET</text:span> signifie : on utilise une adresse <text:span text:style-name="Strong_20_Emphasis">IPv4</text:span>.</text:p>
        </text:list-item>
        <text:list-item>
          <text:p text:style-name="P29">Obligatoire pour que <text:span text:style-name="Source_20_Text">socket()</text:span> et <text:span text:style-name="Source_20_Text">bind()</text:span> sachent comment interpréter la structure.</text:p>
        </text:list-item>
      </text:list>
      <text:h text:style-name="Heading_20_4" text:outline-level="4"><text:span text:style-name="Source_20_Text">server_addr.sin_addr.s_addr = htonl(INADDR_ANY);</text:span></text:h>
      <text:p text:style-name="Text_20_body">Indique l’<text:span text:style-name="Strong_20_Emphasis">adresse IP</text:span> locale sur laquelle le serveur va écouter.</text:p>
      <text:list text:style-name="L28">
        <text:list-item>
          <text:p text:style-name="P30"><text:span text:style-name="Source_20_Text">INADDR_ANY</text:span> = <text:span text:style-name="Source_20_Text">0.0.0.0</text:span> → Cela veut dire : <text:span text:style-name="Strong_20_Emphasis">écouter sur toutes les interfaces réseau disponibles</text:span> (Wi-Fi, Ethernet, etc.).</text:p>
        </text:list-item>
        <text:list-item>
          <text:p text:style-name="P30"><text:span text:style-name="Source_20_Text">htonl()</text:span> : convertit l'adresse IP du format <text:span text:style-name="Strong_20_Emphasis">hôte</text:span> au format <text:span text:style-name="Strong_20_Emphasis">réseau</text:span> (big endian).</text:p>
          <text:list>
            <text:list-item>
              <text:p text:style-name="P30">H = Host</text:p>
            </text:list-item>
            <text:list-item>
              <text:p text:style-name="P30">N = Network</text:p>
            </text:list-item>
            <text:list-item>
              <text:p text:style-name="P30">L = Long (entier 32 bits</text:p>
            </text:list-item>
          </text:list>
        </text:list-item>
      </text:list>
      <text:h text:style-name="Heading_20_4" text:outline-level="4"><text:span text:style-name="Source_20_Text">server_addr.sin_port = htons(PORT);</text:span></text:h>
      <text:p text:style-name="Text_20_body">Définit le <text:span text:style-name="Strong_20_Emphasis">port TCP</text:span> sur lequel le serveur écoutera (ex: 11000).</text:p>
      <text:list text:style-name="L29">
        <text:list-item>
          <text:p text:style-name="P31"><text:span text:style-name="Source_20_Text">PORT</text:span> doit être défini quelque part (par exemple <text:span text:style-name="Source_20_Text">#define PORT 11000</text:span>)</text:p>
        </text:list-item>
        <text:list-item>
          <text:p text:style-name="P31"><text:span text:style-name="Source_20_Text">htons()</text:span> convertit l’entier 16 bits du port au format <text:span text:style-name="Strong_20_Emphasis">réseau</text:span> (big endian)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20:51:26.858919558</meta:creation-date>
    <dc:date>2025-07-18T23:30:37.949114543</dc:date>
    <meta:editing-duration>PT2H28M4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60" meta:word-count="525" meta:character-count="3150" meta:non-whitespace-character-count="2721"/>
  </office:meta>
</office:document-meta>
</file>