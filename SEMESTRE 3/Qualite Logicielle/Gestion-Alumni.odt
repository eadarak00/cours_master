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line-height="150%"/>
      <style:text-properties style:font-name="Times New Roman"/>
    </style:style>
    <style:style style:name="P2" style:family="paragraph" style:parent-style-name="Heading_20_1">
      <style:paragraph-properties fo:line-height="150%"/>
      <style:text-properties officeooo:paragraph-rsid="000264e4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Heading_20_1">
      <style:paragraph-properties fo:line-height="150%"/>
      <style:text-properties officeooo:paragraph-rsid="0003f86c"/>
    </style:style>
    <style:style style:name="P5" style:family="paragraph" style:parent-style-name="Heading_20_1">
      <style:paragraph-properties fo:line-height="150%"/>
      <style:text-properties officeooo:paragraph-rsid="0004ca1b"/>
    </style:style>
    <style:style style:name="P6" style:family="paragraph" style:parent-style-name="Heading_20_2">
      <style:paragraph-properties fo:margin-top="0.122cm" fo:margin-bottom="0.122cm" style:contextual-spacing="false" fo:line-height="150%" fo:orphans="2" fo:widows="2"/>
      <style:text-properties style:font-name="Times New Roman" officeooo:paragraph-rsid="00010a51"/>
    </style:style>
    <style:style style:name="P7" style:family="paragraph" style:parent-style-name="Heading_20_2">
      <style:paragraph-properties fo:line-height="150%"/>
    </style:style>
    <style:style style:name="P8" style:family="paragraph" style:parent-style-name="Heading_20_2">
      <style:paragraph-properties fo:line-height="150%"/>
      <style:text-properties officeooo:paragraph-rsid="00010a51"/>
    </style:style>
    <style:style style:name="P9" style:family="paragraph" style:parent-style-name="Heading_20_2">
      <style:paragraph-properties fo:line-height="150%"/>
      <style:text-properties officeooo:paragraph-rsid="0003f86c"/>
    </style:style>
    <style:style style:name="P10" style:family="paragraph" style:parent-style-name="Heading_20_2">
      <style:paragraph-properties fo:line-height="150%"/>
      <style:text-properties officeooo:paragraph-rsid="0004ca1b"/>
    </style:style>
    <style:style style:name="P11" style:family="paragraph" style:parent-style-name="Heading_20_3">
      <style:paragraph-properties fo:line-height="150%"/>
    </style:style>
    <style:style style:name="P12" style:family="paragraph" style:parent-style-name="Heading_20_3">
      <style:paragraph-properties fo:line-height="150%"/>
      <style:text-properties officeooo:paragraph-rsid="0004ca1b"/>
    </style:style>
    <style:style style:name="P13" style:family="paragraph" style:parent-style-name="Standard" style:list-style-name="L29">
      <style:paragraph-properties fo:line-height="150%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04ca1b"/>
    </style:style>
    <style:style style:name="P16" style:family="paragraph" style:parent-style-name="Text_20_body" style:list-style-name="L7">
      <style:paragraph-properties fo:line-height="150%"/>
      <style:text-properties officeooo:rsid="00009667" officeooo:paragraph-rsid="00009667"/>
    </style:style>
    <style:style style:name="P17" style:family="paragraph" style:parent-style-name="Text_20_body" style:list-style-name="L7">
      <style:paragraph-properties fo:line-height="150%"/>
      <style:text-properties fo:color="#000000" loext:opacity="100%" style:font-name="Times New Roman" officeooo:rsid="00010a51" officeooo:paragraph-rsid="00010a51"/>
    </style:style>
    <style:style style:name="P18" style:family="paragraph" style:parent-style-name="Text_20_body" style:list-style-name="L2">
      <style:paragraph-properties fo:line-height="150%"/>
      <style:text-properties fo:color="#000000" loext:opacity="100%" style:font-name="Times New Roman" officeooo:rsid="00010a51" officeooo:paragraph-rsid="00010a51"/>
    </style:style>
    <style:style style:name="P19" style:family="paragraph" style:parent-style-name="Text_20_body" style:list-style-name="L7">
      <style:paragraph-properties fo:line-height="150%"/>
      <style:text-properties fo:color="#000000" loext:opacity="100%" style:font-name="Times New Roman"/>
    </style:style>
    <style:style style:name="P20" style:family="paragraph" style:parent-style-name="Text_20_body" style:list-style-name="L2">
      <style:paragraph-properties fo:line-height="150%"/>
      <style:text-properties fo:color="#000000" loext:opacity="100%" style:font-name="Times New Roman"/>
    </style:style>
    <style:style style:name="P21" style:family="paragraph" style:parent-style-name="Text_20_body" style:list-style-name="L5">
      <style:paragraph-properties fo:margin-top="0.122cm" fo:margin-bottom="0.122cm" style:contextual-spacing="false" fo:line-height="150%" fo:orphans="2" fo:widows="2"/>
      <style:text-properties fo:color="#000000" loext:opacity="100%" style:font-name="Times New Roman" officeooo:paragraph-rsid="00010a51"/>
    </style:style>
    <style:style style:name="P22" style:family="paragraph" style:parent-style-name="Text_20_body">
      <style:paragraph-properties fo:margin-top="0.423cm" fo:margin-bottom="0.423cm" style:contextual-spacing="false" fo:line-height="150%" fo:orphans="2" fo:widows="2"/>
      <style:text-properties fo:color="#000000" loext:opacity="100%" style:font-name="Times New Roman" officeooo:paragraph-rsid="00010a51"/>
    </style:style>
    <style:style style:name="P23" style:family="paragraph" style:parent-style-name="Text_20_body">
      <style:paragraph-properties fo:line-height="150%"/>
      <style:text-properties fo:color="#000000" loext:opacity="100%" style:font-name="Times New Roman"/>
    </style:style>
    <style:style style:name="P24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5" style:family="paragraph" style:parent-style-name="Text_20_body" style:list-style-name="L16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6" style:family="paragraph" style:parent-style-name="Text_20_body" style:list-style-name="L17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7" style:family="paragraph" style:parent-style-name="Text_20_body" style:list-style-name="L18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8" style:family="paragraph" style:parent-style-name="Text_20_body" style:list-style-name="L26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9" style:family="paragraph" style:parent-style-name="Text_20_body" style:list-style-name="L26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3f86c"/>
    </style:style>
    <style:style style:name="P30" style:family="paragraph" style:parent-style-name="Text_20_body" style:list-style-name="L27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31" style:family="paragraph" style:parent-style-name="Text_20_body" style:list-style-name="L22">
      <style:text-properties officeooo:paragraph-rsid="0004ca1b"/>
    </style:style>
    <style:style style:name="P32" style:family="paragraph" style:parent-style-name="Text_20_body">
      <style:text-properties officeooo:paragraph-rsid="0004ca1b"/>
    </style:style>
    <style:style style:name="P33" style:family="paragraph" style:parent-style-name="Text_20_body" style:list-style-name="L7">
      <style:paragraph-properties fo:line-height="150%"/>
    </style:style>
    <style:style style:name="P34" style:family="paragraph" style:parent-style-name="Text_20_body" style:list-style-name="L3">
      <style:paragraph-properties fo:line-height="150%"/>
    </style:style>
    <style:style style:name="P35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officeooo:paragraph-rsid="00010a51"/>
    </style:style>
    <style:style style:name="P36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</style:style>
    <style:style style:name="P37" style:family="paragraph" style:parent-style-name="Text_20_body" style:list-style-name="L16">
      <style:paragraph-properties fo:margin-top="0cm" fo:margin-bottom="0cm" style:contextual-spacing="false" fo:line-height="150%" fo:orphans="2" fo:widows="2" fo:padding="0cm" fo:border="none"/>
      <style:text-properties officeooo:paragraph-rsid="000264e4"/>
    </style:style>
    <style:style style:name="P38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officeooo:paragraph-rsid="0003f86c"/>
    </style:style>
    <style:style style:name="P39" style:family="paragraph" style:parent-style-name="Text_20_body">
      <style:paragraph-properties fo:line-height="150%"/>
    </style:style>
    <style:style style:name="P40" style:family="paragraph" style:parent-style-name="Text_20_body" style:list-style-name="L20">
      <style:paragraph-properties fo:line-height="150%"/>
    </style:style>
    <style:style style:name="P41" style:family="paragraph" style:parent-style-name="Text_20_body" style:list-style-name="L23">
      <style:paragraph-properties fo:line-height="150%"/>
    </style:style>
    <style:style style:name="P42" style:family="paragraph" style:parent-style-name="Text_20_body" style:list-style-name="L28">
      <style:paragraph-properties fo:line-height="150%"/>
    </style:style>
    <style:style style:name="P43" style:family="paragraph" style:parent-style-name="Text_20_body" style:list-style-name="L22">
      <style:paragraph-properties fo:line-height="150%"/>
    </style:style>
    <style:style style:name="P44" style:family="paragraph" style:parent-style-name="Text_20_body" style:list-style-name="L35">
      <style:paragraph-properties fo:line-height="150%"/>
    </style:style>
    <style:style style:name="P45" style:family="paragraph" style:parent-style-name="Text_20_body" style:list-style-name="L30">
      <style:paragraph-properties fo:line-height="150%"/>
    </style:style>
    <style:style style:name="P46" style:family="paragraph" style:parent-style-name="Text_20_body" style:list-style-name="L33">
      <style:paragraph-properties fo:line-height="150%"/>
    </style:style>
    <style:style style:name="P47" style:family="paragraph" style:parent-style-name="Text_20_body" style:list-style-name="L33">
      <style:paragraph-properties fo:line-height="150%"/>
      <style:text-properties officeooo:paragraph-rsid="0004ca1b"/>
    </style:style>
    <style:style style:name="P48" style:family="paragraph" style:parent-style-name="Text_20_body" style:list-style-name="L34">
      <style:paragraph-properties fo:line-height="150%"/>
    </style:style>
    <style:style style:name="P49" style:family="paragraph" style:parent-style-name="Title">
      <style:paragraph-properties fo:line-height="150%"/>
      <style:text-properties style:font-name="Times New Roman"/>
    </style:style>
    <style:style style:name="T1" style:family="text">
      <style:text-properties officeooo:rsid="00009667"/>
    </style:style>
    <style:style style:name="T2" style:family="text">
      <style:text-properties style:font-name="Times New Roman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ca1b" style:font-weight-asian="normal" style:font-weight-complex="normal"/>
    </style:style>
    <style:style style:name="T5" style:family="text">
      <style:text-properties officeooo:rsid="0000f04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10a51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264e4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3f86c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bold"/>
    </style:style>
    <style:style style:name="T13" style:family="text">
      <style:text-properties fo:font-variant="normal" fo:text-transform="none" fo:color="#000000" loext:opacity="100%" style:font-name="Times New Roman" fo:font-size="15pt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Times New Roman" fo:font-size="15pt" fo:letter-spacing="normal" fo:font-style="normal" fo:font-weight="bold" officeooo:rsid="00010a51"/>
    </style:style>
    <style:style style:name="T15" style:family="text">
      <style:text-properties fo:font-variant="normal" fo:text-transform="none" fo:color="#000000" loext:opacity="100%" style:font-name="Times New Roman" fo:font-size="15pt" fo:letter-spacing="normal" fo:font-style="normal" fo:font-weight="bold" officeooo:rsid="0003f86c"/>
    </style:style>
    <style:style style:name="T16" style:family="text">
      <style:text-properties fo:font-variant="normal" fo:text-transform="none" fo:font-size="12pt" fo:letter-spacing="normal" fo:font-style="normal" fo:font-weight="normal"/>
    </style:style>
    <style:style style:name="T17" style:family="text">
      <style:text-properties fo:font-variant="normal" fo:text-transform="none" fo:font-size="12pt" fo:letter-spacing="normal" fo:font-style="normal" fo:font-weight="normal" officeooo:rsid="00010a51"/>
    </style:style>
    <style:style style:name="T18" style:family="text">
      <style:text-properties fo:color="#000000" loext:opacity="100%" style:font-name="Times New Roman"/>
    </style:style>
    <style:style style:name="T19" style:family="text">
      <style:text-properties fo:color="#000000" loext:opacity="100%" style:font-name="Times New Roman" fo:font-weight="normal" style:font-weight-asian="normal" style:font-weight-complex="normal"/>
    </style:style>
    <style:style style:name="T20" style:family="text">
      <style:text-properties fo:color="#000000" loext:opacity="100%" style:font-name="Times New Roman" fo:font-weight="normal" officeooo:rsid="0000f04d" style:font-weight-asian="normal" style:font-weight-complex="normal"/>
    </style:style>
    <style:style style:name="T21" style:family="text">
      <style:text-properties officeooo:rsid="000264e4"/>
    </style:style>
    <style:style style:name="T22" style:family="text">
      <style:text-properties officeooo:rsid="0003f86c"/>
    </style:style>
    <style:style style:name="T23" style:family="text">
      <style:text-properties officeooo:rsid="0004ca1b"/>
    </style:style>
    <style:style style:name="T24" style:family="text">
      <style:text-properties officeooo:rsid="0005226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Projet : Plateforme de Gestion des Alumni</text:p>
      <text:h text:style-name="P1" text:outline-level="1">E<text:span text:style-name="T1">P</text:span>1 - Gestion des utilisateurs et sécurité</text:h>
      <text:h text:style-name="P7" text:outline-level="2">US1.1 - <text:span text:style-name="T24">Création de compte par Rôle</text:span></text:h>
      <text:p text:style-name="P14">En tant qu’utilisateur,</text:p>
      <text:p text:style-name="P14">je veux pouvoir créer un compte selon mon rôle</text:p>
      <text:list text:style-name="L7">
        <text:list-item>
          <text:p text:style-name="P33"><text:span text:style-name="Strong_20_Emphasis"><text:span text:style-name="T8">Créer le microservice d'authentification</text:span></text:span></text:p>
        </text:list-item>
        <text:list-item>
          <text:p text:style-name="P16"><text:span text:style-name="Strong_20_Emphasis"><text:span text:style-name="T19">Création </text:span></text:span><text:span text:style-name="Strong_20_Emphasis"><text:span text:style-name="T20">des</text:span></text:span><text:span text:style-name="Strong_20_Emphasis"><text:span text:style-name="T19"> rôle</text:span></text:span><text:span text:style-name="Strong_20_Emphasis"><text:span text:style-name="T18"> (</text:span></text:span><text:span text:style-name="Source_20_Text"><text:span text:style-name="T18">ETUDIANT</text:span></text:span><text:span text:style-name="Strong_20_Emphasis"><text:span text:style-name="T18">, </text:span></text:span><text:span text:style-name="Source_20_Text"><text:span text:style-name="T18">ALUMNI</text:span></text:span><text:span text:style-name="Strong_20_Emphasis"><text:span text:style-name="T18">, </text:span></text:span><text:span text:style-name="Source_20_Text"><text:span text:style-name="T18">ADMIN</text:span></text:span><text:span text:style-name="Strong_20_Emphasis"><text:span text:style-name="T18">)</text:span></text:span></text:p>
        </text:list-item>
        <text:list-item>
          <text:p text:style-name="P33"><text:span text:style-name="T18">Créer la base de données </text:span><text:span text:style-name="Source_20_Text"><text:span text:style-name="T18">User</text:span></text:span><text:span text:style-name="T18"> avec champs communs</text:span></text:p>
        </text:list-item>
        <text:list-item>
          <text:p text:style-name="P19">Créer endpoint <text:span text:style-name="T5">l’inscription</text:span></text:p>
        </text:list-item>
        <text:list-item>
          <text:p text:style-name="P19">Ajouter validation des rôles (ETUDIANT, ALUMNI, ADMIN)</text:p>
        </text:list-item>
        <text:list-item>
          <text:p text:style-name="P19">Envoyer email de confirmation <text:span text:style-name="T5">pour l’activation du compte</text:span></text:p>
        </text:list-item>
        <text:list-item>
          <text:p text:style-name="P17">Tester avec Postman</text:p>
        </text:list-item>
      </text:list>
      <text:h text:style-name="P7" text:outline-level="2">US1.2 - <text:span text:style-name="T24">Connexion</text:span></text:h>
      <text:p text:style-name="P14">En tant qu’utilisateur, </text:p>
      <text:p text:style-name="P14">je veux pouvoir me connecter avec mes identifiants</text:p>
      <text:list text:style-name="L2">
        <text:list-item>
          <text:p text:style-name="P20">Endpoint <text:span text:style-name="T5">pour la connexion</text:span></text:p>
        </text:list-item>
        <text:list-item>
          <text:p text:style-name="P20">Génération JWT</text:p>
        </text:list-item>
        <text:list-item>
          <text:p text:style-name="P20"><text:span text:style-name="T16">Développer le système de hashage des mots de passe</text:span></text:p>
        </text:list-item>
        <text:list-item>
          <text:p text:style-name="P20">Gestion du rafraîchissement de token</text:p>
        </text:list-item>
        <text:list-item>
          <text:p text:style-name="P18">Tester avec Postman</text:p>
        </text:list-item>
      </text:list>
      <text:h text:style-name="P7" text:outline-level="2">US1.3 - <text:span text:style-name="T24">Reinitialisation du mot de passe</text:span></text:h>
      <text:p text:style-name="P14">En tant qu’utilisateur, </text:p>
      <text:p text:style-name="P14">je veux pouvoir réinitialiser mon mot de passe</text:p>
      <text:list text:style-name="L3">
        <text:list-item>
          <text:p text:style-name="P34">Endpoi<text:span text:style-name="T5">nt pour l’oublie du mot de passe</text:span></text:p>
        </text:list-item>
        <text:list-item>
          <text:p text:style-name="P34"><text:soft-page-break/>Envoi d’un email avec lien sécurisé</text:p>
        </text:list-item>
        <text:list-item>
          <text:p text:style-name="P34">Endpoin<text:span text:style-name="T5">t pour la reinitialisation du mot de passe</text:span></text:p>
        </text:list-item>
      </text:list>
      <text:h text:style-name="P7" text:outline-level="2"><text:span text:style-name="Strong_20_Emphasis"><text:span text:style-name="T13">U</text:span></text:span><text:span text:style-name="Strong_20_Emphasis"><text:span text:style-name="T14">S</text:span></text:span><text:span text:style-name="Strong_20_Emphasis"><text:span text:style-name="T13">1.</text:span></text:span><text:span text:style-name="Strong_20_Emphasis"><text:span text:style-name="T14">4 - Compléter</text:span></text:span><text:span text:style-name="Strong_20_Emphasis"><text:span text:style-name="T13"> </text:span></text:span><text:span text:style-name="Strong_20_Emphasis"><text:span text:style-name="T14">la création de compte</text:span></text:span><text:span text:style-name="Strong_20_Emphasis"><text:span text:style-name="T13"> Étudiant</text:span></text:span></text:h>
      <text:p text:style-name="P35"><text:span text:style-name="Strong_20_Emphasis"><text:span text:style-name="T12">En tant qu'</text:span></text:span><text:span text:style-name="T8"> étudiant<text:line-break/></text:span><text:span text:style-name="Strong_20_Emphasis"><text:span text:style-name="T12">Je veux</text:span></text:span><text:span text:style-name="T8"> pouvoir c</text:span><text:span text:style-name="T9">ompléter mon inscription au niveau de la plateforme</text:span></text:p>
      <text:list xml:id="list1621909610" text:style-name="L5">
        <text:list-item>
          <text:p text:style-name="P21"><text:span text:style-name="T16">Développer le formulaire d'inscription étudiant</text:span></text:p>
        </text:list-item>
        <text:list-item>
          <text:p text:style-name="P21"><text:span text:style-name="T17">Ajouter les champs manquantes lors de l’inscription</text:span></text:p>
        </text:list-item>
        <text:list-item>
          <text:p text:style-name="P21"><text:span text:style-name="T16">Implémenter la validation des données étudiant</text:span></text:p>
        </text:list-item>
      </text:list>
      <text:h text:style-name="P8" text:outline-level="2"><text:span text:style-name="Strong_20_Emphasis"><text:span text:style-name="T13">U</text:span></text:span><text:span text:style-name="Strong_20_Emphasis"><text:span text:style-name="T14">S</text:span></text:span><text:span text:style-name="Strong_20_Emphasis"><text:span text:style-name="T13">1.</text:span></text:span><text:span text:style-name="Strong_20_Emphasis"><text:span text:style-name="T14">5 - Compléter</text:span></text:span><text:span text:style-name="Strong_20_Emphasis"><text:span text:style-name="T13"> </text:span></text:span><text:span text:style-name="Strong_20_Emphasis"><text:span text:style-name="T14">la création de compte</text:span></text:span><text:span text:style-name="Strong_20_Emphasis"><text:span text:style-name="T13"> </text:span></text:span><text:span text:style-name="Strong_20_Emphasis"><text:span text:style-name="T14">Alumni</text:span></text:span></text:h>
      <text:p text:style-name="P35"><text:span text:style-name="Strong_20_Emphasis"><text:span text:style-name="T12">En tant qu'</text:span></text:span><text:span text:style-name="T8"> </text:span><text:span text:style-name="T9">alumni</text:span><text:span text:style-name="T8"><text:line-break/></text:span><text:span text:style-name="Strong_20_Emphasis"><text:span text:style-name="T12">Je veux</text:span></text:span><text:span text:style-name="T8"> pouvoir c</text:span><text:span text:style-name="T9">ompléter mon inscription au niveau de la plateforme</text:span></text:p>
      <text:list text:continue-numbering="true" text:style-name="L5">
        <text:list-item>
          <text:p text:style-name="P21"><text:span text:style-name="T16">Développer le formulaire d'inscription </text:span><text:span text:style-name="T17">d’alumni</text:span></text:p>
        </text:list-item>
        <text:list-item>
          <text:p text:style-name="P21"><text:span text:style-name="T17">Ajouter les champs manquantes lors de l’inscription</text:span></text:p>
        </text:list-item>
        <text:list-item>
          <text:p text:style-name="P21"><text:span text:style-name="T16">Implémenter la vérification du statut alumni</text:span></text:p>
        </text:list-item>
        <text:list-item>
          <text:p text:style-name="P21"><text:span text:style-name="T16">Développer le système de validation des diplômes</text:span></text:p>
        </text:list-item>
      </text:list>
      <text:h text:style-name="P6" text:outline-level="2" text:is-list-header="true"><text:span text:style-name="Strong_20_Emphasis"><text:span text:style-name="T7"/></text:span></text:h>
      <text:h text:style-name="P2" text:outline-level="1"><text:span text:style-name="Strong_20_Emphasis">E</text:span><text:span text:style-name="Strong_20_Emphasis"><text:span text:style-name="T21">P</text:span></text:span><text:span text:style-name="Strong_20_Emphasis">2 - Gestion des Profils et CV</text:span></text:h>
      <text:h text:style-name="P7" text:outline-level="2"><text:span text:style-name="Strong_20_Emphasis">U</text:span><text:span text:style-name="Strong_20_Emphasis"><text:span text:style-name="T21">S</text:span></text:span><text:span text:style-name="Strong_20_Emphasis">2.1 - Création et Gestion de CV - Étudiant</text:span></text:h>
      <text:p text:style-name="P36"><text:span text:style-name="Strong_20_Emphasis"><text:span text:style-name="T12">En tant qu'</text:span></text:span><text:span text:style-name="T8"> étudiant<text:line-break/></text:span><text:span text:style-name="Strong_20_Emphasis"><text:span text:style-name="T12">Je veux</text:span></text:span><text:span text:style-name="T8"> créer et gérer mon CV<text:line-break/></text:span><text:span text:style-name="Strong_20_Emphasis"><text:span text:style-name="T12">Afin de</text:span></text:span><text:span text:style-name="T8"> me présenter aux alumni</text:span></text:p>
      <text:list text:style-name="L16">
        <text:list-item>
          <text:p text:style-name="P25">Créer le microservice de gestion des CV</text:p>
        </text:list-item>
        <text:list-item>
          <text:p text:style-name="P25">Développer l'éditeur de CV</text:p>
        </text:list-item>
        <text:list-item>
          <text:p text:style-name="P25">Implémenter les templates de CV</text:p>
        </text:list-item>
        <text:list-item>
          <text:p text:style-name="P25"><text:soft-page-break/>Créer le système de sauvegarde automatique</text:p>
        </text:list-item>
        <text:list-item>
          <text:p text:style-name="P25">Développer l'import de données LinkedIn</text:p>
        </text:list-item>
        <text:list-item>
          <text:p text:style-name="P37"><text:span text:style-name="T8">Implémenter l'export PDF/Word</text:span></text:p>
        </text:list-item>
      </text:list>
      <text:h text:style-name="P7" text:outline-level="2"><text:span text:style-name="Strong_20_Emphasis">U</text:span><text:span text:style-name="Strong_20_Emphasis"><text:span text:style-name="T21">S</text:span></text:span><text:span text:style-name="Strong_20_Emphasis">2.2 - Consultation des CV - Alumni</text:span></text:h>
      <text:p text:style-name="P36"><text:span text:style-name="Strong_20_Emphasis"><text:span text:style-name="T12">En tant qu'</text:span></text:span><text:span text:style-name="T8"> alumni<text:line-break/></text:span><text:span text:style-name="Strong_20_Emphasis"><text:span text:style-name="T12">Je veux</text:span></text:span><text:span text:style-name="T8"> consulter les CV des étudiants<text:line-break/></text:span><text:span text:style-name="Strong_20_Emphasis"><text:span text:style-name="T12">Afin de</text:span></text:span><text:span text:style-name="T8"> les aider dans leur orientation</text:span></text:p>
      <text:list text:style-name="L17">
        <text:list-item>
          <text:p text:style-name="P26">Développer l'interface de consultation des CV</text:p>
        </text:list-item>
        <text:list-item>
          <text:p text:style-name="P26">Implémenter le système de demande d'accès</text:p>
        </text:list-item>
        <text:list-item>
          <text:p text:style-name="P26">Créer le visualiseur de CV</text:p>
        </text:list-item>
        <text:list-item>
          <text:p text:style-name="P26">Développer les fonctionnalités de recherche dans les CV</text:p>
        </text:list-item>
        <text:list-item>
          <text:p text:style-name="P26">Implémenter le système de favoris</text:p>
        </text:list-item>
      </text:list>
      <text:h text:style-name="P7" text:outline-level="2"><text:span text:style-name="Strong_20_Emphasis">U</text:span><text:span text:style-name="Strong_20_Emphasis"><text:span text:style-name="T21">S2.3 -</text:span></text:span><text:span text:style-name="Strong_20_Emphasis"> Téléchargement de CV</text:span></text:h>
      <text:p text:style-name="P36"><text:span text:style-name="Strong_20_Emphasis"><text:span text:style-name="T12">En tant qu'</text:span></text:span><text:span text:style-name="T8"> alumni<text:line-break/></text:span><text:span text:style-name="Strong_20_Emphasis"><text:span text:style-name="T12">Je veux</text:span></text:span><text:span text:style-name="T8"> télécharger des CV sur demande<text:line-break/></text:span><text:span text:style-name="Strong_20_Emphasis"><text:span text:style-name="T12">Afin de</text:span></text:span><text:span text:style-name="T8"> les partager avec des recruteur</text:span><text:span text:style-name="T10">s</text:span></text:p>
      <text:list text:style-name="L18">
        <text:list-item>
          <text:p text:style-name="P27">Développer le système de demande de téléchargement</text:p>
        </text:list-item>
        <text:list-item>
          <text:p text:style-name="P27">Implémenter les permissions de téléchargement</text:p>
        </text:list-item>
        <text:list-item>
          <text:p text:style-name="P27">Créer le générateur de CV exportables</text:p>
        </text:list-item>
        <text:list-item>
          <text:p text:style-name="P27">Développer le tracking des téléchargements</text:p>
        </text:list-item>
      </text:list>
      <text:h text:style-name="P3" text:outline-level="1"><text:span text:style-name="Strong_20_Emphasis"><text:span text:style-name="T21">EP3 - </text:span></text:span><text:span text:style-name="Strong_20_Emphasis">Système de Recherche et Réseautage</text:span></text:h>
      <text:h text:style-name="P7" text:outline-level="2"><text:span text:style-name="Strong_20_Emphasis">U</text:span><text:span text:style-name="Strong_20_Emphasis"><text:span text:style-name="T21">S</text:span></text:span><text:span text:style-name="Strong_20_Emphasis">3.1 - Recherche d'Alumni</text:span></text:h>
      <text:p text:style-name="P39"><text:span text:style-name="Strong_20_Emphasis"><text:span text:style-name="T12">En tant qu'</text:span></text:span><text:span text:style-name="T8"> utilisateur<text:line-break/></text:span><text:span text:style-name="Strong_20_Emphasis"><text:span text:style-name="T12">Je veux</text:span></text:span><text:span text:style-name="T8"> rechercher des alumni<text:line-break/></text:span><text:span text:style-name="Strong_20_Emphasis"><text:span text:style-name="T12">Afin de</text:span></text:span><text:span text:style-name="T8"> élargir mon réseau professionnel</text:span></text:p>
      <text:list text:style-name="L20">
        <text:list-item>
          <text:p text:style-name="P40">Créer le microservice de recherche</text:p>
        </text:list-item>
        <text:list-item>
          <text:p text:style-name="P40">Développer l'algorithme de recherche avancée</text:p>
        </text:list-item>
        <text:list-item>
          <text:p text:style-name="P40"><text:soft-page-break/>Implémenter les filtres (secteur, entreprise, localisation)</text:p>
        </text:list-item>
        <text:list-item>
          <text:p text:style-name="P40">Créer l'indexation des profils</text:p>
        </text:list-item>
        <text:list-item>
          <text:p text:style-name="P40">Implémenter les suggestions de recherche</text:p>
        </text:list-item>
      </text:list>
      <text:h text:style-name="P7" text:outline-level="2">U<text:span text:style-name="T22">S</text:span> <text:span text:style-name="T22">3</text:span>.<text:span text:style-name="T23">2 </text:span>: Recherche et Liste Admin</text:h>
      <text:p text:style-name="P39"><text:span text:style-name="T6">En tant qu’administrateur</text:span><text:line-break/><text:span text:style-name="T6">Je veux</text:span> rechercher et afficher une liste d'alumni avec filtres<text:line-break/><text:span text:style-name="T6">Afin de</text:span> gérer efficacement la communauté</text:p>
      <text:p text:style-name="P39"/>
      <text:list text:style-name="L23">
        <text:list-item>
          <text:p text:style-name="P41">Créer l'interface admin de recherche</text:p>
        </text:list-item>
        <text:list-item>
          <text:p text:style-name="P41">Ajouter des filtres administratifs (statut compte, activité)</text:p>
        </text:list-item>
        <text:list-item>
          <text:p text:style-name="P41">Implémenter l'export de listes</text:p>
        </text:list-item>
      </text:list>
      <text:h text:style-name="P4" text:outline-level="1"><text:span text:style-name="Strong_20_Emphasis">EP4 - Système de Messagerie</text:span></text:h>
      <text:h text:style-name="P4" text:outline-level="1"><text:span text:style-name="Strong_20_Emphasis"><text:span text:style-name="T13">U</text:span></text:span><text:span text:style-name="Strong_20_Emphasis"><text:span text:style-name="T15">S</text:span></text:span><text:span text:style-name="Strong_20_Emphasis"><text:span text:style-name="T13"> 4.1 - Envoi de Messages </text:span></text:span><text:span text:style-name="Strong_20_Emphasis"><text:span text:style-name="T15">Alumni</text:span></text:span></text:h>
      <text:p text:style-name="P36"><text:span text:style-name="Strong_20_Emphasis"><text:span text:style-name="T12">En tant qu'</text:span></text:span><text:span text:style-name="T8"> utilisateur<text:line-break/></text:span><text:span text:style-name="Strong_20_Emphasis"><text:span text:style-name="T12">Je veux</text:span></text:span><text:span text:style-name="T8"> envoyer des messages aux alumni<text:line-break/></text:span><text:span text:style-name="Strong_20_Emphasis"><text:span text:style-name="T12">Afin de</text:span></text:span><text:span text:style-name="T8"> établir des contacts professionnels</text:span></text:p>
      <text:list xml:id="list3349864523" text:style-name="L26">
        <text:list-item>
          <text:p text:style-name="P28">Créer le microservice de messagerie</text:p>
        </text:list-item>
        <text:list-item>
          <text:p text:style-name="P28">Développer l'interface de messagerie</text:p>
        </text:list-item>
        <text:list-item>
          <text:p text:style-name="P28">Implémenter les conversations en temps réel</text:p>
        </text:list-item>
        <text:list-item>
          <text:p text:style-name="P28">Créer le système de notifications</text:p>
        </text:list-item>
        <text:list-item>
          <text:p text:style-name="P28">Développer la modération des messages</text:p>
        </text:list-item>
        <text:list-item>
          <text:p text:style-name="P28">Implémenter les pièces jointes</text:p>
        </text:list-item>
      </text:list>
      <text:h text:style-name="P4" text:outline-level="1"><text:span text:style-name="Strong_20_Emphasis"><text:span text:style-name="T13">U</text:span></text:span><text:span text:style-name="Strong_20_Emphasis"><text:span text:style-name="T15">S</text:span></text:span><text:span text:style-name="Strong_20_Emphasis"><text:span text:style-name="T13"> 4.</text:span></text:span><text:span text:style-name="Strong_20_Emphasis"><text:span text:style-name="T15">2</text:span></text:span><text:span text:style-name="Strong_20_Emphasis"><text:span text:style-name="T13"> - Envoi de Messages </text:span></text:span><text:span text:style-name="Strong_20_Emphasis"><text:span text:style-name="T15">etudiant</text:span></text:span></text:h>
      <text:p text:style-name="P38"><text:span text:style-name="Strong_20_Emphasis"><text:span text:style-name="T12">En tant qu'</text:span></text:span><text:span text:style-name="T8"> utilisateur<text:line-break/></text:span><text:span text:style-name="Strong_20_Emphasis"><text:span text:style-name="T12">Je veux</text:span></text:span><text:span text:style-name="T8"> envoyer des messages aux </text:span><text:span text:style-name="T11">étudiants</text:span><text:span text:style-name="T8"><text:line-break/></text:span><text:span text:style-name="Strong_20_Emphasis"><text:span text:style-name="T12">Afin de</text:span></text:span><text:span text:style-name="T8"> établir des contacts professionnels</text:span></text:p>
      <text:list text:continue-numbering="true" text:style-name="L26">
        <text:list-item>
          <text:p text:style-name="P29"><text:soft-page-break/>Développer l'interface de messagerie <text:span text:style-name="T22">pour l’étudiant</text:span></text:p>
        </text:list-item>
        <text:list-item>
          <text:p text:style-name="P29">Implémenter les conversations en temps réel</text:p>
        </text:list-item>
        <text:list-item>
          <text:p text:style-name="P29">Créer le système de notifications</text:p>
        </text:list-item>
        <text:list-item>
          <text:p text:style-name="P29">Développer la modération des messages</text:p>
        </text:list-item>
        <text:list-item>
          <text:p text:style-name="P29">Implémenter les pièces jointes</text:p>
        </text:list-item>
      </text:list>
      <text:h text:style-name="P9" text:outline-level="2"><text:span text:style-name="Strong_20_Emphasis"><text:span text:style-name="T13">U</text:span></text:span><text:span text:style-name="Strong_20_Emphasis"><text:span text:style-name="T15">S 4.3 -</text:span></text:span><text:span text:style-name="Strong_20_Emphasis"><text:span text:style-name="T13"> Partage d'Informations</text:span></text:span></text:h>
      <text:h text:style-name="P9" text:outline-level="2"><text:span text:style-name="Strong_20_Emphasis"><text:span text:style-name="T12">En tant qu'</text:span></text:span><text:span text:style-name="T8"> alumni<text:line-break/></text:span><text:span text:style-name="Strong_20_Emphasis"><text:span text:style-name="T12">Je veux</text:span></text:span><text:span text:style-name="T8"> partager des offres d'emploi et formations<text:line-break/></text:span><text:span text:style-name="Strong_20_Emphasis"><text:span text:style-name="T12">Afin de</text:span></text:span><text:span text:style-name="T8"> aider la communauté</text:span></text:h>
      <text:list text:style-name="L27">
        <text:list-item>
          <text:p text:style-name="P30">Développer le système de publication</text:p>
        </text:list-item>
        <text:list-item>
          <text:p text:style-name="P30">Créer les formats de partage (offres, formations, actualités)</text:p>
        </text:list-item>
        <text:list-item>
          <text:p text:style-name="P30">Implémenter les modérations des publications</text:p>
        </text:list-item>
        <text:list-item>
          <text:p text:style-name="P30">Développer le système de likes/commentaires</text:p>
        </text:list-item>
        <text:list-item>
          <text:p text:style-name="P30">Créer le fil d'actualités</text:p>
        </text:list-item>
      </text:list>
      <text:h text:style-name="P5" text:outline-level="1">Epic <text:span text:style-name="T23">5</text:span> - Invitation et Croissance du Réseau</text:h>
      <text:h text:style-name="P10" text:outline-level="2">U<text:span text:style-name="T23">S5</text:span>.1- Invitation d'Alumni par Alumni</text:h>
      <text:p text:style-name="P39"><text:span text:style-name="T6">En tant qu’Alumni</text:span><text:line-break/><text:span text:style-name="T6">Je veux</text:span> inviter d'autres alumni à rejoindre la plateforme<text:line-break/><text:span text:style-name="T6">Afin d</text:span>’élargir le réseau</text:p>
      <text:list text:style-name="L28">
        <text:list-item>
          <text:p text:style-name="P42">Développer le système d'envoi d'invitations</text:p>
        </text:list-item>
        <text:list-item>
          <text:p text:style-name="P42">Créer les templates d'emails d'invitation</text:p>
        </text:list-item>
        <text:list-item>
          <text:p text:style-name="P42">Implémenter le tracking des invitations</text:p>
        </text:list-item>
        <text:list-item>
          <text:p text:style-name="P42">Développer le système de parrainage</text:p>
        </text:list-item>
        <text:list-item>
          <text:p text:style-name="P42">Créer les statistiques d'invitations</text:p>
        </text:list-item>
      </text:list>
      <text:h text:style-name="P10" text:outline-level="2">U<text:span text:style-name="T23">S5</text:span>.2: Invitation par Étudiant</text:h>
      <text:p text:style-name="P39"><text:span text:style-name="T6">En tant qu’étudiant</text:span><text:line-break/><text:span text:style-name="T6">Je veux</text:span> inviter des alumni<text:line-break/><text:span text:style-name="T6">Afin d’enrichir</text:span> le réseau</text:p>
      <text:list text:style-name="L22">
        <text:list-item>
          <text:p text:style-name="P43"><text:soft-page-break/><text:span text:style-name="T23">Adapter</text:span> le système d'envoi d'invitations</text:p>
        </text:list-item>
        <text:list-item>
          <text:p text:style-name="P43">Créer les templates d'emails d'invitation</text:p>
        </text:list-item>
        <text:list-item>
          <text:p text:style-name="P43">Implémenter le tracking des invitations</text:p>
        </text:list-item>
        <text:list-item>
          <text:p text:style-name="P43">Créer les statistiques d'invitations</text:p>
        </text:list-item>
      </text:list>
      <text:p text:style-name="P15"><text:span text:style-name="T6"/></text:p>
      <text:h text:style-name="P10" text:outline-level="2">U<text:span text:style-name="T23">S5.</text:span>3 - Invitation par Admin</text:h>
      <text:p text:style-name="P39"><text:span text:style-name="T6">En tant qu’administrateur</text:span><text:line-break/><text:span text:style-name="T6">Je veux</text:span> inviter des alumni en masse<text:line-break/><text:span text:style-name="T6">Afin de</text:span> développer rapidement la plateforme</text:p>
      <text:list text:style-name="L35">
        <text:list-item>
          <text:p text:style-name="P44">Créer l'outil d'invitation en masse</text:p>
        </text:list-item>
        <text:list-item>
          <text:p text:style-name="P44">Implémenter le suivi</text:p>
        </text:list-item>
        <text:list-item>
          <text:p text:style-name="P44">Créer les statistiques d'invitations</text:p>
        </text:list-item>
      </text:list>
      <text:h text:style-name="P3" text:outline-level="1"><text:span text:style-name="Strong_20_Emphasis">EP</text:span><text:span text:style-name="Strong_20_Emphasis"><text:span text:style-name="T23">6</text:span></text:span><text:span text:style-name="Strong_20_Emphasis"> - Administration et Monitoring</text:span></text:h>
      <text:h text:style-name="P7" text:outline-level="2"><text:span text:style-name="Strong_20_Emphasis">US</text:span><text:span text:style-name="Strong_20_Emphasis"><text:span text:style-name="T23">6</text:span></text:span><text:span text:style-name="Strong_20_Emphasis">.1 – </text:span><text:span text:style-name="Strong_20_Emphasis"><text:span text:style-name="T23">Monitoring de la plateforme</text:span></text:span></text:h>
      <text:p text:style-name="P14"><text:span text:style-name="Strong_20_Emphasis">En tant qu’administrateur</text:span></text:p>
      <text:p text:style-name="P14"><text:span text:style-name="Strong_20_Emphasis"><text:span text:style-name="T4">J</text:span></text:span><text:span text:style-name="Strong_20_Emphasis"><text:span text:style-name="T3">e veux monitorer l’activité de la plateforme</text:span></text:span></text:p>
      <text:p text:style-name="P14"><text:span text:style-name="Strong_20_Emphasis"><text:span text:style-name="T3"/></text:span></text:p>
      <text:list text:style-name="L29">
        <text:list-item>
          <text:p text:style-name="P13">Créer le microservice <text:span text:style-name="Strong_20_Emphasis">Admin-Service</text:span> et <text:span text:style-name="Strong_20_Emphasis">Analytics-Service</text:span></text:p>
        </text:list-item>
        <text:list-item>
          <text:p text:style-name="P13">Dashboard d’administration (statistiques utilisateurs, connexions, messages, etc.)</text:p>
        </text:list-item>
        <text:list-item>
          <text:p text:style-name="P13">Rapports automatiques d’activité</text:p>
        </text:list-item>
        <text:list-item>
          <text:p text:style-name="P13">Alertes système et logs d’audit</text:p>
        </text:list-item>
        <text:list-item>
          <text:p text:style-name="P13">Monitoring des microservices</text:p>
        </text:list-item>
      </text:list>
      <text:h text:style-name="P7" text:outline-level="2"><text:span text:style-name="Strong_20_Emphasis">US</text:span><text:span text:style-name="Strong_20_Emphasis"><text:span text:style-name="T23">6</text:span></text:span><text:span text:style-name="Strong_20_Emphasis">.2 – </text:span><text:span text:style-name="Strong_20_Emphasis"><text:span text:style-name="T23">Modération du contenu</text:span></text:span></text:h>
      <text:p text:style-name="P14"><text:span text:style-name="Strong_20_Emphasis"><text:span text:style-name="T3">En tant qu’administrateur,</text:span></text:span></text:p>
      <text:p text:style-name="P14"><text:span text:style-name="Strong_20_Emphasis"><text:span text:style-name="T3">je veux gérer et modérer les contenus</text:span></text:span></text:p>
      <text:p text:style-name="P14"><text:span text:style-name="Strong_20_Emphasis"/></text:p>
      <text:list text:style-name="L30">
        <text:list-item>
          <text:p text:style-name="P45">Système de <text:span text:style-name="Strong_20_Emphasis">modération temps réel</text:span></text:p>
        </text:list-item>
        <text:list-item>
          <text:p text:style-name="P45"><text:soft-page-break/>Gestion des signalements</text:p>
        </text:list-item>
        <text:list-item>
          <text:p text:style-name="P45">Outils pour suspendre ou supprimer des publications</text:p>
        </text:list-item>
        <text:list-item>
          <text:p text:style-name="P45">Statistiques de modération</text:p>
        </text:list-item>
      </text:list>
      <text:h text:style-name="P7" text:outline-level="2"><text:span text:style-name="Strong_20_Emphasis">EP7 - Expérience Utilisateur et Performance</text:span></text:h>
      <text:h text:style-name="P11" text:outline-level="3"><text:span text:style-name="Strong_20_Emphasis">US7.1 – </text:span><text:span text:style-name="Strong_20_Emphasis"><text:span text:style-name="T23">Adaptabilite</text:span></text:span></text:h>
      <text:p text:style-name="P14"><text:span text:style-name="Strong_20_Emphasis"><text:span text:style-name="T3">En tant qu’utilisateur</text:span></text:span></text:p>
      <text:p text:style-name="P14"><text:span text:style-name="Strong_20_Emphasis"><text:span text:style-name="T3">je veux une interface fluide et responsive</text:span></text:span></text:p>
      <text:list text:style-name="L33">
        <text:list-item>
          <text:p text:style-name="P46">Design responsive (mobile, tablette, desktop)</text:p>
        </text:list-item>
        <text:list-item>
          <text:p text:style-name="P46">Implémenter <text:span text:style-name="Strong_20_Emphasis">PWA</text:span> pour mobile</text:p>
        </text:list-item>
        <text:list-item>
          <text:p text:style-name="P46">Optimiser les performances front-end</text:p>
        </text:list-item>
        <text:list-item>
          <text:p text:style-name="P47">Tests de compatibilité multi-navigateurs</text:p>
        </text:list-item>
      </text:list>
      <text:h text:style-name="P12" text:outline-level="3"><text:span text:style-name="Strong_20_Emphasis">US7.2 – </text:span><text:span text:style-name="Strong_20_Emphasis"><text:span text:style-name="T23">Performance</text:span></text:span></text:h>
      <text:p text:style-name="P14"><text:span text:style-name="Strong_20_Emphasis"><text:span text:style-name="T3">En tant qu’administrateur, </text:span></text:span></text:p>
      <text:p text:style-name="P14"><text:span text:style-name="Strong_20_Emphasis"><text:span text:style-name="T3">je veux une plateforme performante et scalable</text:span></text:span><text:span text:style-name="Strong_20_Emphasis"> </text:span></text:p>
      <text:p text:style-name="P14"><text:span text:style-name="Strong_20_Emphasis"/></text:p>
      <text:list text:style-name="L34">
        <text:list-item>
          <text:p text:style-name="P48">Configuration de la <text:span text:style-name="Strong_20_Emphasis">mise en cache (Redis, etc.)</text:span></text:p>
        </text:list-item>
        <text:list-item>
          <text:p text:style-name="P48">Mise en place du <text:span text:style-name="Strong_20_Emphasis">load balancing</text:span></text:p>
        </text:list-item>
        <text:list-item>
          <text:p text:style-name="P48">Optimisation des requêtes et index BDD</text:p>
        </text:list-item>
        <text:list-item>
          <text:p text:style-name="P48">Scalabilité automatique (Kubernetes/Docker Swarm)</text:p>
        </text:list-item>
        <text:list-item>
          <text:p text:style-name="P48">Monitoring des performances (Prometheus, Grafana)</text:p>
        </text:list-item>
      </text:list>
      <text:p text:style-name="P23"><text:line-break/></text:p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next-style-name="Standard" style:class="chapter">
      <style:paragraph-properties fo:margin-top="0.423cm" fo:margin-bottom="0.423cm" style:contextual-spacing="true" fo:text-align="center" style:justify-single-word="false"/>
      <style:text-properties fo:font-size="24pt" fo:letter-spacing="-0.018cm" fo:font-weight="bold" style:letter-kerning="true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style-name="Gra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style:font-name="Times New Roman1" fo:font-family="'Times New Roman'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54" style:display-name="ListLabel 154" style:family="text"/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7:48:38.096436016</meta:creation-date>
    <dc:date>2025-11-11T19:10:05.212041354</dc:date>
    <meta:editing-duration>PT2M32S</meta:editing-duration>
    <meta:editing-cycles>1</meta:editing-cycles>
    <meta:document-statistic meta:table-count="0" meta:image-count="0" meta:object-count="0" meta:page-count="7" meta:paragraph-count="147" meta:word-count="1016" meta:character-count="6381" meta:non-whitespace-character-count="5593"/>
    <meta:generator>LibreOffice/24.2.7.2$Linux_X86_64 LibreOffice_project/420$Build-2</meta:generator>
  </office:meta>
</office:document-meta>
</file>